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Wordmark">clenzy<text:span text:style-name="WordmarkDot">.</text:span></text:p>
            <text:p text:style-name="BrandTagline">Propreté &amp; multiservices · Paris</text:p>
          </table:table-cell>
          <table:table-cell table:style-name="PartiesCell">
            <text:p text:style-name="DocTypeEyebrow">Justificatif</text:p>
            <text:p text:style-name="DocTypeTitle">PAIEMENT</text:p>
            <text:p text:style-name="DocTypeMeta"><text:span text:style-name="Strong">Référence n° :</text:span> ${system.numero_auto}</text:p>
            <text:p text:style-name="DocTypeMeta"><text:span text:style-name="Strong">Date d'émission :</text:span> ${system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[#if client.societe??]${client.societe}[/#if]</text:p>
            <text:p text:style-name="PartyDetail">[#if client.email??]${client.email}[/#if]</text:p>
            <text:p text:style-name="PartyDetail">[#if client.telephone??]${client.telephone}[/#if]</text:p>
            <text:p text:style-name="PartyMuted">[#if client.code_postal??]${client.code_postal} ${client.ville}[/#if]</text:p>
          </table:table-cell>
        </table:table-row>
      </table:table>
      <text:p text:style-name="SectionTitle">Bien concerné</text:p>
      <table:table table:name="InfoCardBien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property.type??]${property.type}[/#if]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[#if property.surface??]${property.surface} m²[/#if]</text:p>
          </table:table-cell>
        </table:table-row>
      </table:table>
      <text:p text:style-name="SectionTitle">Intervention</text:p>
      <table:table table:name="InfoCardInter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#${intervention.id}</text:p>
          </table:table-cell>
        </table:table-row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[#if intervention.titre??]${intervention.titre}[/#if]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[#if intervention.type??]${intervention.type}[/#if]</text:p>
          </table:table-cell>
        </table:table-row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intervention.statut??]${intervention.statut}[/#if]</text:p>
          </table:table-cell>
        </table:table-row>
        <table:table-row>
          <table:table-cell table:style-name="InfoCardCellLabel">
            <text:p text:style-name="InfoLabelText">Période</text:p>
          </table:table-cell>
          <table:table-cell table:style-name="InfoCardCellValue">
            <text:p text:style-name="InfoValueText">[#if intervention.date_debut??]${intervention.date_debut}[/#if][#if intervention.date_fin??] → ${intervention.date_fin}[/#if]</text:p>
          </table:table-cell>
        </table:table-row>
        <table:table-row>
          <table:table-cell table:style-name="InfoCardCellLabel">
            <text:p text:style-name="InfoLabelText">Complétée le</text:p>
          </table:table-cell>
          <table:table-cell table:style-name="InfoCardCellValue">
            <text:p text:style-name="InfoValueText">[#if intervention.date_completion??]${intervention.date_completion}[/#if][#if intervention.duree_reelle??] · durée ${intervention.duree_reelle}[/#if]</text:p>
          </table:table-cell>
        </table:table-row>
      </table:table>
      <text:p text:style-name="CalloutLabel">[#if intervention.description??]Détail de l'intervention[/#if]</text:p>
      <text:p text:style-name="CalloutText">[#if intervention.description??]${intervention.description}[/#if]</text:p>
      <text:p text:style-name="Small">[#if technicien.nom_complet??]</text:p>
      <text:p text:style-name="SectionTitle">Technicien / Prestataire</text:p>
      <table:table table:name="InfoCardTech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Nom</text:p>
          </table:table-cell>
          <table:table-cell table:style-name="InfoCardCellValue">
            <text:p text:style-name="InfoValueText">${technicien.nom_complet}</text:p>
          </table:table-cell>
        </table:table-row>
        <table:table-row>
          <table:table-cell table:style-name="InfoCardCellLabel">
            <text:p text:style-name="InfoLabelText">Contact</text:p>
          </table:table-cell>
          <table:table-cell table:style-name="InfoCardCellValue">
            <text:p text:style-name="InfoValueText">[#if technicien.email??]${technicien.email}[/#if][#if technicien.telephone??] · ${technicien.telephone}[/#if]</text:p>
          </table:table-cell>
        </table:table-row>
      </table:table>
      <text:p text:style-name="Small">[/#if]</text:p>
      <text:p text:style-name="SectionTitle">Détail des prestation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if intervention.lignes??]</text:p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ext:p>[/#if]</text:p>
        <table:table-row>
          <table:table-cell table:style-name="TableTotalCellLabel" table:number-columns-spanned="3">
            <text:p text:style-name="TotalLabelText">Montant total</text:p>
          </table:table-cell>
          <table:covered-table-cell/>
          <table:covered-table-cell/>
          <table:table-cell table:style-name="TableTotalCellValue">
            <text:p text:style-name="TotalValueText">${intervention.cout_reel}</text:p>
          </table:table-cell>
        </table:table-row>
      </table:table>
      <text:p text:style-name="Footnote">Estimation initiale : ${intervention.cout_estime}</text:p>
      <text:p text:style-name="SectionTitle">Paiement</text:p>
      <table:table table:name="InfoCardPay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Statut</text:p>
          </table:table-cell>
          <table:table-cell table:style-name="InfoCardCellValue">
            <text:p text:style-name="InfoValueText">[#if paiement.statut??]${paiement.statut}[/#if]</text:p>
          </table:table-cell>
        </table:table-row>
        <table:table-row>
          <table:table-cell table:style-name="InfoCardCellLabel">
            <text:p text:style-name="InfoLabelText">Montant réglé</text:p>
          </table:table-cell>
          <table:table-cell table:style-name="InfoCardCellValue">
            <text:p text:style-name="InfoValueText">[#if paiement.montant??]${paiement.montant}[/#if]</text:p>
          </table:table-cell>
        </table:table-row>
        <table:table-row>
          <table:table-cell table:style-name="InfoCardCellLabel">
            <text:p text:style-name="InfoLabelText">Date de paiement</text:p>
          </table:table-cell>
          <table:table-cell table:style-name="InfoCardCellValue">
            <text:p text:style-name="InfoValueText">[#if paiement.date_paiement??]${paiement.date_paiement}[/#if]</text:p>
          </table:table-cell>
        </table:table-row>
        <table:table-row>
          <table:table-cell table:style-name="InfoCardCellLabel">
            <text:p text:style-name="InfoLabelText">Référence</text:p>
          </table:table-cell>
          <table:table-cell table:style-name="InfoCardCellValue">
            <text:p text:style-name="InfoValueText">[#if paiement.reference_stripe??]${paiement.reference_stripe}[/#if]</text:p>
          </table:table-cell>
        </table:table-row>
      </table:table>
      <text:p text:style-name="Small">[#if intervention.notes??]</text:p>
      <text:p text:style-name="CalloutLabel">Notes</text:p>
      <text:p text:style-name="CalloutText">${intervention.notes}</text:p>
      <text:p text:style-name="Small">[/#if]</text:p>
      <text:p text:style-name="Small">[#if intervention.notes_technicien??]</text:p>
      <text:p text:style-name="CalloutLabel">Notes du technicien</text:p>
      <text:p text:style-name="CalloutText">${intervention.notes_technicien}</text:p>
      <text:p text:style-name="Small">[/#if]</text:p>
      <text:p text:style-name="Footnote">[#if nf.conditions_paiement??]${nf.conditions_paiement}[/#if]</text:p>
      <text:p text:style-name="Footnote">[#if nf??]${nf.legal_mention_1}[/#if]</text:p>
      <text:p text:style-name="Footnote">[#if nf.legal_mention_2??]${nf.legal_mention_2}[/#if]</text:p>
      <text:p text:style-name="Footnote">${entreprise.nom} — ${entreprise.adresse} — SIRET ${entreprise.siret}</text:p>
      <text:p text:style-name="Footnote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Fraunces" svg:font-family="'Fraunces', 'Garamond', 'Georgia', serif"/>
    <style:font-face style:name="Inter" svg:font-family="'Inter', 'Helvetica Neue', 'Arial', sans-serif"/>
    <style:font-face style:name="DM Sans" svg:font-family="'DM Sans', 'Inter', 'Helvetica Neue', sans-serif"/>
    <style:font-face style:name="Space Grotesk" svg:font-family="'Space Grotesk', 'Inter', 'Helvetica Neue', 'Arial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211F1C"/>
    </style:default-style>
    <style:style style:name="Default" style:family="paragraph" style:class="text">
      <style:paragraph-properties fo:margin-top="0pt" fo:margin-bottom="0pt"/>
      <style:text-properties style:font-name="Inter" fo:font-size="10pt" fo:color="#211F1C"/>
    </style:style>
    <!-- ── Brand banner (Clenzy in cream) ── -->
    <style:style style:name="BrandBanner" style:family="paragraph">
      <style:paragraph-properties fo:text-align="start" fo:margin-bottom="2mm"/>
      <style:text-properties style:font-name="Fraunces" fo:font-size="28pt" fo:font-weight="bold" fo:color="#4A4138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6E6256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6E6256" fo:letter-spacing="2pt" style:text-transform="uppercase"/>
    </style:style>
    <style:style style:name="DocTypeTitle" style:family="paragraph">
      <style:paragraph-properties fo:text-align="end" fo:margin-bottom="2mm"/>
      <style:text-properties style:font-name="Fraunces" fo:font-size="22pt" fo:font-weight="bold" fo:color="#4A4138"/>
    </style:style>
    <style:style style:name="DocTypeMeta" style:family="paragraph">
      <style:paragraph-properties fo:text-align="end" fo:margin-bottom="1mm"/>
      <style:text-properties style:font-name="Inter" fo:font-size="9pt" fo:color="#6B645C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8C7B6B"/>
      <style:text-properties style:font-name="Inter" fo:font-size="9pt" fo:font-weight="bold" fo:color="#4A4138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6E6256" fo:letter-spacing="1.5pt" style:text-transform="uppercase"/>
    </style:style>
    <style:style style:name="PartyName" style:family="paragraph">
      <style:paragraph-properties fo:margin-top="0pt" fo:margin-bottom="0.8mm"/>
      <style:text-properties style:font-name="Fraunces" fo:font-size="14pt" fo:font-weight="bold" fo:color="#4A4138"/>
    </style:style>
    <style:style style:name="PartyDetail" style:family="paragraph">
      <style:paragraph-properties fo:margin-top="0pt" fo:margin-bottom="0.3mm"/>
      <style:text-properties style:font-name="Inter" fo:font-size="9.5pt" fo:color="#211F1C"/>
    </style:style>
    <style:style style:name="PartyMuted" style:family="paragraph">
      <style:paragraph-properties fo:margin-top="0pt" fo:margin-bottom="0.3mm"/>
      <style:text-properties style:font-name="Inter" fo:font-size="9pt" fo:color="#6B645C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211F1C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4A4138"/>
    </style:style>
    <style:style style:name="Footnote" style:family="paragraph">
      <style:paragraph-properties fo:margin-top="2mm" fo:margin-bottom="1mm"/>
      <style:text-properties style:font-name="Inter" fo:font-size="8.5pt" fo:color="#6B645C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padding="1mm 3mm 2mm 3mm" fo:border-bottom="1.2pt solid #8C7B6B"/>
    </style:style>
    <style:style style:name="TableBodyCell" style:family="table-cell">
      <style:table-cell-properties fo:padding="3mm" fo:border-bottom="0.5pt solid #E7E0D4"/>
    </style:style>
    <style:style style:name="TableTotalCellLabel" style:family="table-cell">
      <style:table-cell-properties fo:background-color="#F1EBE2" fo:padding="3mm" fo:border-top="1pt solid #8C7B6B"/>
    </style:style>
    <style:style style:name="TableTotalCellValue" style:family="table-cell">
      <style:table-cell-properties fo:background-color="#F1EBE2" fo:padding="3mm" fo:border-top="1pt solid #8C7B6B"/>
    </style:style>
    <style:style style:name="TableHeaderText" style:family="paragraph">
      <style:paragraph-properties fo:text-align="start"/>
      <style:text-properties style:font-name="Inter" fo:font-size="8pt" fo:font-weight="bold" fo:color="#6E6256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6E6256" fo:letter-spacing="1.2pt" style:text-transform="uppercase"/>
    </style:style>
    <style:style style:name="TableCellText" style:family="paragraph">
      <style:paragraph-properties/>
      <style:text-properties style:font-name="Inter" fo:font-size="9.5pt" fo:color="#211F1C"/>
    </style:style>
    <style:style style:name="TableCellTextRight" style:family="paragraph">
      <style:paragraph-properties fo:text-align="end"/>
      <style:text-properties style:font-name="Inter" fo:font-size="9.5pt" fo:color="#211F1C"/>
    </style:style>
    <style:style style:name="TotalLabelText" style:family="paragraph">
      <style:paragraph-properties fo:text-align="end"/>
      <style:text-properties style:font-name="Inter" fo:font-size="10pt" fo:font-weight="bold" fo:color="#4A4138" fo:letter-spacing="1pt" style:text-transform="uppercase"/>
    </style:style>
    <style:style style:name="TotalValueText" style:family="paragraph">
      <style:paragraph-properties fo:text-align="end"/>
      <style:text-properties style:font-name="Fraunces" fo:font-size="16pt" fo:font-weight="bold" fo:color="#4A4138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1EBE2" fo:border-bottom="0.5pt solid #E7E0D4"/>
    </style:style>
    <style:style style:name="InfoCardCellValue" style:family="table-cell">
      <style:table-cell-properties fo:padding="2mm 3mm" fo:background-color="#FFFFFF" fo:border-bottom="0.5pt solid #E7E0D4"/>
    </style:style>
    <style:style style:name="InfoLabelText" style:family="paragraph">
      <style:text-properties style:font-name="Inter" fo:font-size="8.5pt" fo:font-weight="bold" fo:color="#6B645C" fo:letter-spacing="0.8pt" style:text-transform="uppercase"/>
    </style:style>
    <style:style style:name="InfoValueText" style:family="paragraph">
      <style:text-properties style:font-name="Inter" fo:font-size="10pt" fo:color="#211F1C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645C" fo:letter-spacing="1.2pt" style:text-transform="uppercase"/>
    </style:style>
    <style:style style:name="SignatureLine" style:family="paragraph">
      <style:paragraph-properties fo:padding-top="14mm" fo:border-top="0.5pt solid #211F1C"/>
      <style:text-properties style:font-name="Inter" fo:font-size="9pt" fo:font-style="italic" fo:color="#6B645C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645C"/>
    </style:style>
    <!-- ── Inline text ── -->
    <style:style style:name="Strong" style:family="text">
      <style:text-properties fo:font-weight="bold" fo:color="#4A4138"/>
    </style:style>
    <style:style style:name="Italic" style:family="text">
      <style:text-properties fo:font-style="italic"/>
    </style:style>
    <style:style style:name="Gold" style:family="text">
      <style:text-properties fo:font-weight="bold" fo:color="#6E6256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  <style:style style:name="Wordmark" style:family="paragraph">
      <style:paragraph-properties fo:margin-bottom="2mm"/>
      <style:text-properties style:font-name="Space Grotesk" fo:font-size="27pt" fo:font-weight="bold" fo:color="#211F1C" fo:letter-spacing="-0.5pt"/>
    </style:style>
    <style:style style:name="WordmarkDot" style:family="text">
      <style:text-properties fo:color="#B0714F" fo:font-weight="bold"/>
    </style:style>
    <style:style style:name="FullCol" style:family="table-column">
      <style:table-column-properties style:column-width="170mm"/>
    </style:style>
    <style:style style:name="CalloutCell" style:family="table-cell">
      <style:table-cell-properties fo:background-color="#FFFFFF" fo:padding="3.5mm" fo:border-left="3pt solid #8C7B6B" fo:border-top="0.5pt solid #E7E0D4" fo:border-right="0.5pt solid #E7E0D4" fo:border-bottom="0.5pt solid #E7E0D4"/>
    </style:style>
    <style:style style:name="CalloutLabel" style:family="paragraph">
      <style:paragraph-properties fo:margin-bottom="1mm"/>
      <style:text-properties style:font-name="Inter" fo:font-size="7.5pt" fo:font-weight="bold" fo:color="#6E6256" fo:letter-spacing="1.2pt" style:text-transform="uppercase"/>
    </style:style>
    <style:style style:name="CalloutText" style:family="paragraph">
      <style:paragraph-properties fo:background-color="#FFFFFF" fo:border-left="3pt solid #8C7B6B" fo:border-top="0.5pt solid #E7E0D4" fo:border-right="0.5pt solid #E7E0D4" fo:border-bottom="0.5pt solid #E7E0D4" fo:padding="3.5mm" fo:margin-top="1mm"/>
      <style:text-properties style:font-name="Inter" fo:font-size="9.5pt" fo:color="#211F1C"/>
    </style:style>
    <style:style style:name="TotalOnDemand" style:family="paragraph">
      <style:paragraph-properties fo:text-align="end"/>
      <style:text-properties style:font-name="Inter" fo:font-size="11pt" fo:font-style="italic" fo:color="#6E6256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 fo:background-color="#FAF9F6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