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Justificatif</text:p>
            <text:p text:style-name="DocTypeTitle">REMBOURSEMENT</text:p>
            <text:p text:style-name="DocTypeMeta"><text:span text:style-name="Strong">Référenc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#if technicien.nom_complet??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intervention.lignes??]</text:p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${intervention.cout_reel}</text:p>
          </table:table-cell>
        </table:table-row>
      </table:table>
      <text:p text:style-name="Footnote">Estimation initiale : ${intervention.cout_estime}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