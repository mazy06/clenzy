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lenzy_logo.png" manifest:media-type="image/png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Devis</text:p>
            <text:p text:style-name="DocTypeTitle">DEVIS</text:p>
            <text:p text:style-name="DocTypeMeta"><text:span text:style-name="Strong">Devis n° :</text:span> ${nf.numero}</text:p>
            <text:p text:style-name="DocTypeMeta"><text:span text:style-name="Strong">Date :</text:span> ${nf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${client.societe}</text:p>
            <text:p text:style-name="PartyDetail">${client.email}</text:p>
            <text:p text:style-name="PartyDetail">${client.telephone}</text:p>
            <text:p text:style-name="PartyMuted">${client.code_postal} ${client.ville}</text:p>
          </table:table-cell>
        </table:table-row>
      </table:table>
      <text:p text:style-name="SectionTitle">Bien concerné</text:p>
      <table:table table:name="InfoCard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${property.type}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${property.surface} m²</text:p>
          </table:table-cell>
        </table:table-row>
      </table:table>
      <text:p text:style-name="SectionTitle">Demande</text:p>
      <table:table table:name="InfoCard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${demande.titre}</text:p>
          </table:table-cell>
        </table:table-row>
        <table:table-row>
          <table:table-cell table:style-name="InfoCardCellLabel">
            <text:p text:style-name="InfoLabelText">Type de prestation</text:p>
          </table:table-cell>
          <table:table-cell table:style-name="InfoCardCellValue">
            <text:p text:style-name="InfoValueText">${demande.type_service}</text:p>
          </table:table-cell>
        </table:table-row>
        <table:table-row>
          <table:table-cell table:style-name="InfoCardCellLabel">
            <text:p text:style-name="InfoLabelText">Priorité</text:p>
          </table:table-cell>
          <table:table-cell table:style-name="InfoCardCellValue">
            <text:p text:style-name="InfoValueText">${demande.priorite}</text:p>
          </table:table-cell>
        </table:table-row>
        <table:table-row>
          <table:table-cell table:style-name="InfoCardCellLabel">
            <text:p text:style-name="InfoLabelText">Date souhaitée</text:p>
          </table:table-cell>
          <table:table-cell table:style-name="InfoCardCellValue">
            <text:p text:style-name="InfoValueText">${demande.date_souhaitee}</text:p>
          </table:table-cell>
        </table:table-row>
        <table:table-row>
          <table:table-cell table:style-name="InfoCardCellLabel">
            <text:p text:style-name="InfoLabelText">Créneau préféré</text:p>
          </table:table-cell>
          <table:table-cell table:style-name="InfoCardCellValue">
            <text:p text:style-name="InfoValueText">${demande.creneau}</text:p>
          </table:table-cell>
        </table:table-row>
      </table:table>
      <text:p text:style-name="CalloutLabel">Résumé de la demande</text:p>
      <text:p text:style-name="CalloutText">${demande.description}</text:p>
      <text:p text:style-name="SectionTitle">Détail du devi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able:table-row>
          <table:table-cell table:style-name="TableTotalCellLabel" table:number-columns-spanned="3">
            <text:p text:style-name="TotalLabelText">Total estimé</text:p>
          </table:table-cell>
          <table:covered-table-cell/>
          <table:covered-table-cell/>
          <table:table-cell table:style-name="TableTotalCellValue">
            <text:p>[#if demande.cout_estime == "Sur demande"]</text:p>
            <text:p text:style-name="TotalOnDemand">Sur demande</text:p>
            <text:p>[#else]</text:p>
            <text:p text:style-name="TotalValueText">${demande.cout_estime}</text:p>
            <text:p>[/#if]</text:p>
          </table:table-cell>
        </table:table-row>
      </table:table>
      <text:p text:style-name="Footnote">${nf.conditions_paiement}</text:p>
      <text:p text:style-name="Footnote">${nf.validite}</text:p>
      <table:table table:name="Signatur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SignatureLabel">Pour Clenzy</text:p>
            <text:p text:style-name="SignatureLine">Nom &amp; signature</text:p>
          </table:table-cell>
          <table:table-cell table:style-name="PartiesCell">
            <text:p text:style-name="SignatureLabel">Bon pour accord — Client</text:p>
            <text:p text:style-name="SignatureLine">Nom &amp; signatur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