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lenzy_logo.png" manifest:media-type="image/png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Ménage</text:p>
            <text:p text:style-name="DocTypeTitle">DEVIS MÉNAGE</text:p>
            <text:p text:style-name="DocTypeMeta"><text:span text:style-name="Strong">Date :</text:span> ${system.date}</text:p>
            <text:p text:style-name="DocTypeMeta"><text:span text:style-name="Strong">Réf. :</text:span> ${system.numero_auto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</table:table-cell>
          <table:table-cell table:style-name="PartiesCell">
            <text:p text:style-name="PartyLabel">Propriétaire</text:p>
            <text:p text:style-name="PartyName">${client.nom_complet}</text:p>
            <text:p text:style-name="PartyDetail">${client.email}</text:p>
            <text:p text:style-name="PartyDetail">${client.telephone}</text:p>
          </table:table-cell>
        </table:table-row>
      </table:table>
      <text:p text:style-name="SectionTitle">Logement concerné</text:p>
      <table:table table:name="InfoCard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${property.surface}</text:p>
          </table:table-cell>
        </table:table-row>
        <table:table-row>
          <table:table-cell table:style-name="InfoCardCellLabel">
            <text:p text:style-name="InfoLabelText">Chambres / SDB</text:p>
          </table:table-cell>
          <table:table-cell table:style-name="InfoCardCellValue">
            <text:p text:style-name="InfoValueText">${property.chambres} ch. / ${property.salles_bain} sdb</text:p>
          </table:table-cell>
        </table:table-row>
      </table:table>
      <text:p text:style-name="SectionTitle">Prix conseillé par type de ménage</text:p>
      <table:table table:name="CleaningQuote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Type de ménage</text:p>
            </table:table-cell>
            <table:table-cell table:style-name="TableHeaderCell">
              <text:p text:style-name="TableHeaderTextRight">Durée normée</text:p>
            </table:table-cell>
            <table:table-cell table:style-name="TableHeaderCell">
              <text:p text:style-name="TableHeaderTextRight">Fourchette</text:p>
            </table:table-cell>
            <table:table-cell table:style-name="TableHeaderCell">
              <text:p text:style-name="TableHeaderTextRight">Prix conseillé</text:p>
            </table:table-cell>
          </table:table-row>
        </table:table-header-rows>
        <table:table-row>
          <table:table-cell table:style-name="TableBodyCell">
            <text:p text:style-name="TableCellText">Ménage express</text:p>
          </table:table-cell>
          <table:table-cell table:style-name="TableBodyCell">
            <text:p text:style-name="TableCellTextRight">${menage.express_duree}</text:p>
          </table:table-cell>
          <table:table-cell table:style-name="TableBodyCell">
            <text:p text:style-name="TableCellTextRight">${menage.express_fourchette}</text:p>
          </table:table-cell>
          <table:table-cell table:style-name="TableBodyCell">
            <text:p text:style-name="TableCellTextRight">${menage.express_prix}</text:p>
          </table:table-cell>
        </table:table-row>
        <table:table-row>
          <table:table-cell table:style-name="TableBodyCell">
            <text:p text:style-name="TableCellText">Ménage standard</text:p>
          </table:table-cell>
          <table:table-cell table:style-name="TableBodyCell">
            <text:p text:style-name="TableCellTextRight">${menage.standard_duree}</text:p>
          </table:table-cell>
          <table:table-cell table:style-name="TableBodyCell">
            <text:p text:style-name="TableCellTextRight">${menage.standard_fourchette}</text:p>
          </table:table-cell>
          <table:table-cell table:style-name="TableBodyCell">
            <text:p text:style-name="TableCellTextRight">${menage.standard_prix}</text:p>
          </table:table-cell>
        </table:table-row>
        <table:table-row>
          <table:table-cell table:style-name="TableBodyCell">
            <text:p text:style-name="TableCellText">Ménage en profondeur</text:p>
          </table:table-cell>
          <table:table-cell table:style-name="TableBodyCell">
            <text:p text:style-name="TableCellTextRight">${menage.deep_duree}</text:p>
          </table:table-cell>
          <table:table-cell table:style-name="TableBodyCell">
            <text:p text:style-name="TableCellTextRight">${menage.deep_fourchette}</text:p>
          </table:table-cell>
          <table:table-cell table:style-name="TableBodyCell">
            <text:p text:style-name="TableCellTextRight">${menage.deep_prix}</text:p>
          </table:table-cell>
        </table:table-row>
      </table:table>
      <text:p text:style-name="CalloutLabel">Décomposition du temps (ménage standard)</text:p>
      <text:p text:style-name="CalloutText">${menage.decomposition}</text:p>
      <text:p text:style-name="CalloutText">Taux horaire de référence : ${menage.taux_horaire}</text:p>
      <text:p text:style-name="Footnote">Prix conseillé par la plateforme, à titre indicatif — calculé à partir des caractéristiques du logement (minutes normées par composant × taux horaire de référence). Ce document ne constitue ni un engagement contractuel ni un devis sig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