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gold_rul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body>
    <office:text>
      <table:table table:name="HeaderTable" table:style-name="PartiesTable">
        <table:table-column table:style-name="PartiesCol"/>
        <table:table-column table:style-name="PartiesCol"/>
        <table:table-row>
          <table:table-cell table:style-name="PartiesCell">
            <text:p text:style-name="Wordmark">clenzy<text:span text:style-name="WordmarkDot">.</text:span></text:p>
            <text:p text:style-name="BrandTagline">Propreté &amp; multiservices · Paris</text:p>
          </table:table-cell>
          <table:table-cell table:style-name="PartiesCell">
            <text:p text:style-name="DocTypeEyebrow">Facture</text:p>
            <text:p text:style-name="DocTypeTitle">FACTURE</text:p>
            <text:p text:style-name="DocTypeMeta"><text:span text:style-name="Strong">Facture n° :</text:span> ${system.numero_auto}</text:p>
            <text:p text:style-name="DocTypeMeta"><text:span text:style-name="Strong">Date d'émission :</text:span> ${system.date}</text:p>
          </table:table-cell>
        </table:table-row>
      </table:table>
      <text:p text:style-name="GoldRuleWrap"><draw:frame draw:style-name="GoldRuleFrame" svg:width="17.0cm" svg:height="0.18cm" text:anchor-type="paragraph"><draw:image xlink:href="Pictures/gold_rule.png" xlink:type="simple" xlink:show="embed" xlink:actuate="onLoad"/></draw:frame></text:p>
      <table:table table:name="Parties" table:style-name="PartiesTable">
        <table:table-column table:style-name="PartiesCol"/>
        <table:table-column table:style-name="PartiesCol"/>
        <table:table-row>
          <table:table-cell table:style-name="PartiesCell">
            <text:p text:style-name="PartyLabel">Émetteur</text:p>
            <text:p text:style-name="PartyName">${entreprise.nom}</text:p>
            <text:p text:style-name="PartyDetail">${entreprise.adresse}</text:p>
            <text:p text:style-name="PartyMuted">SIRET ${entreprise.siret}</text:p>
            <text:p text:style-name="PartyMuted">${entreprise.email}</text:p>
            <text:p text:style-name="PartyMuted">${entreprise.telephone}</text:p>
          </table:table-cell>
          <table:table-cell table:style-name="PartiesCell">
            <text:p text:style-name="PartyLabel">Facturé à</text:p>
            <text:p text:style-name="PartyName">${client.nom_complet}</text:p>
            <text:p text:style-name="PartyDetail">[#if client.societe??]${client.societe}[/#if]</text:p>
            <text:p text:style-name="PartyDetail">[#if client.email??]${client.email}[/#if]</text:p>
            <text:p text:style-name="PartyDetail">[#if client.telephone??]${client.telephone}[/#if]</text:p>
            <text:p text:style-name="PartyMuted">[#if client.code_postal??]${client.code_postal} ${client.ville}[/#if]</text:p>
          </table:table-cell>
        </table:table-row>
      </table:table>
      <text:p text:style-name="SectionTitle">Bien concerné</text:p>
      <table:table table:name="InfoCardBien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Bien</text:p>
          </table:table-cell>
          <table:table-cell table:style-name="InfoCardCellValue">
            <text:p text:style-name="InfoValueText">${property.nom}</text:p>
          </table:table-cell>
        </table:table-row>
        <table:table-row>
          <table:table-cell table:style-name="InfoCardCellLabel">
            <text:p text:style-name="InfoLabelText">Adresse</text:p>
          </table:table-cell>
          <table:table-cell table:style-name="InfoCardCellValue">
            <text:p text:style-name="InfoValueText">${property.adresse}, ${property.code_postal} ${property.ville}</text:p>
          </table:table-cell>
        </table:table-row>
        <table:table-row>
          <table:table-cell table:style-name="InfoCardCellLabel">
            <text:p text:style-name="InfoLabelText">Type</text:p>
          </table:table-cell>
          <table:table-cell table:style-name="InfoCardCellValue">
            <text:p text:style-name="InfoValueText">[#if property.type??]${property.type}[/#if]</text:p>
          </table:table-cell>
        </table:table-row>
        <table:table-row>
          <table:table-cell table:style-name="InfoCardCellLabel">
            <text:p text:style-name="InfoLabelText">Surface</text:p>
          </table:table-cell>
          <table:table-cell table:style-name="InfoCardCellValue">
            <text:p text:style-name="InfoValueText">[#if property.surface??]${property.surface} m²[/#if]</text:p>
          </table:table-cell>
        </table:table-row>
      </table:table>
      <text:p text:style-name="SectionTitle">Intervention</text:p>
      <table:table table:name="InfoCardInter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Référence</text:p>
          </table:table-cell>
          <table:table-cell table:style-name="InfoCardCellValue">
            <text:p text:style-name="InfoValueText">#${intervention.id}</text:p>
          </table:table-cell>
        </table:table-row>
        <table:table-row>
          <table:table-cell table:style-name="InfoCardCellLabel">
            <text:p text:style-name="InfoLabelText">Objet</text:p>
          </table:table-cell>
          <table:table-cell table:style-name="InfoCardCellValue">
            <text:p text:style-name="InfoValueText">[#if intervention.titre??]${intervention.titre}[/#if]</text:p>
          </table:table-cell>
        </table:table-row>
        <table:table-row>
          <table:table-cell table:style-name="InfoCardCellLabel">
            <text:p text:style-name="InfoLabelText">Type</text:p>
          </table:table-cell>
          <table:table-cell table:style-name="InfoCardCellValue">
            <text:p text:style-name="InfoValueText">[#if intervention.type??]${intervention.type}[/#if]</text:p>
          </table:table-cell>
        </table:table-row>
        <table:table-row>
          <table:table-cell table:style-name="InfoCardCellLabel">
            <text:p text:style-name="InfoLabelText">Statut</text:p>
          </table:table-cell>
          <table:table-cell table:style-name="InfoCardCellValue">
            <text:p text:style-name="InfoValueText">[#if intervention.statut??]${intervention.statut}[/#if]</text:p>
          </table:table-cell>
        </table:table-row>
        <table:table-row>
          <table:table-cell table:style-name="InfoCardCellLabel">
            <text:p text:style-name="InfoLabelText">Période</text:p>
          </table:table-cell>
          <table:table-cell table:style-name="InfoCardCellValue">
            <text:p text:style-name="InfoValueText">[#if intervention.date_debut??]${intervention.date_debut}[/#if][#if intervention.date_fin??] → ${intervention.date_fin}[/#if]</text:p>
          </table:table-cell>
        </table:table-row>
        <table:table-row>
          <table:table-cell table:style-name="InfoCardCellLabel">
            <text:p text:style-name="InfoLabelText">Complétée le</text:p>
          </table:table-cell>
          <table:table-cell table:style-name="InfoCardCellValue">
            <text:p text:style-name="InfoValueText">[#if intervention.date_completion??]${intervention.date_completion}[/#if][#if intervention.duree_reelle??] · durée ${intervention.duree_reelle}[/#if]</text:p>
          </table:table-cell>
        </table:table-row>
      </table:table>
      <text:p text:style-name="CalloutLabel">[#if intervention.description??]Détail de l'intervention[/#if]</text:p>
      <text:p text:style-name="CalloutText">[#if intervention.description??]${intervention.description}[/#if]</text:p>
      <text:p text:style-name="Small">[#if technicien.nom_complet??]</text:p>
      <text:p text:style-name="SectionTitle">Technicien / Prestataire</text:p>
      <table:table table:name="InfoCardTech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Nom</text:p>
          </table:table-cell>
          <table:table-cell table:style-name="InfoCardCellValue">
            <text:p text:style-name="InfoValueText">${technicien.nom_complet}</text:p>
          </table:table-cell>
        </table:table-row>
        <table:table-row>
          <table:table-cell table:style-name="InfoCardCellLabel">
            <text:p text:style-name="InfoLabelText">Contact</text:p>
          </table:table-cell>
          <table:table-cell table:style-name="InfoCardCellValue">
            <text:p text:style-name="InfoValueText">[#if technicien.email??]${technicien.email}[/#if][#if technicien.telephone??] · ${technicien.telephone}[/#if]</text:p>
          </table:table-cell>
        </table:table-row>
      </table:table>
      <text:p text:style-name="Small">[/#if]</text:p>
      <text:p text:style-name="SectionTitle">Détail des prestations</text:p>
      <table:table table:name="LineItems" table:style-name="LineTable">
        <table:table-column table:style-name="LineColDesc"/>
        <table:table-column table:style-name="LineColQty"/>
        <table:table-column table:style-name="LineColPrice"/>
        <table:table-column table:style-name="LineColTotal"/>
        <table:table-header-rows>
          <table:table-row>
            <table:table-cell table:style-name="TableHeaderCell">
              <text:p text:style-name="TableHeaderText">Désignation</text:p>
            </table:table-cell>
            <table:table-cell table:style-name="TableHeaderCell">
              <text:p text:style-name="TableHeaderTextRight">Qté</text:p>
            </table:table-cell>
            <table:table-cell table:style-name="TableHeaderCell">
              <text:p text:style-name="TableHeaderTextRight">Prix unitaire</text:p>
            </table:table-cell>
            <table:table-cell table:style-name="TableHeaderCell">
              <text:p text:style-name="TableHeaderTextRight">Total</text:p>
            </table:table-cell>
          </table:table-row>
        </table:table-header-rows>
        <text:p>[#if intervention.lignes??]</text:p>
        <text:p>[#list intervention.lignes as ligne]</text:p>
        <table:table-row>
          <table:table-cell table:style-name="TableBodyCell">
            <text:p text:style-name="TableCellText">${ligne.description}</text:p>
          </table:table-cell>
          <table:table-cell table:style-name="TableBodyCell">
            <text:p text:style-name="TableCellTextRight">${ligne.quantite}</text:p>
          </table:table-cell>
          <table:table-cell table:style-name="TableBodyCell">
            <text:p text:style-name="TableCellTextRight">${ligne.prix_unitaire}</text:p>
          </table:table-cell>
          <table:table-cell table:style-name="TableBodyCell">
            <text:p text:style-name="TableCellTextRight">${ligne.total}</text:p>
          </table:table-cell>
        </table:table-row>
        <text:p>[/#list]</text:p>
        <text:p>[/#if]</text:p>
        <table:table-row>
          <table:table-cell table:style-name="TableTotalCellLabel" table:number-columns-spanned="3">
            <text:p text:style-name="TotalLabelText">Montant total</text:p>
          </table:table-cell>
          <table:covered-table-cell/>
          <table:covered-table-cell/>
          <table:table-cell table:style-name="TableTotalCellValue">
            <text:p text:style-name="TotalValueText">${intervention.cout_reel}</text:p>
          </table:table-cell>
        </table:table-row>
      </table:table>
      <text:p text:style-name="Footnote">Estimation initiale : ${intervention.cout_estime}</text:p>
      <text:p text:style-name="SectionTitle">Paiement</text:p>
      <table:table table:name="InfoCardPay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Statut</text:p>
          </table:table-cell>
          <table:table-cell table:style-name="InfoCardCellValue">
            <text:p text:style-name="InfoValueText">[#if paiement.statut??]${paiement.statut}[/#if]</text:p>
          </table:table-cell>
        </table:table-row>
        <table:table-row>
          <table:table-cell table:style-name="InfoCardCellLabel">
            <text:p text:style-name="InfoLabelText">Montant réglé</text:p>
          </table:table-cell>
          <table:table-cell table:style-name="InfoCardCellValue">
            <text:p text:style-name="InfoValueText">[#if paiement.montant??]${paiement.montant}[/#if]</text:p>
          </table:table-cell>
        </table:table-row>
        <table:table-row>
          <table:table-cell table:style-name="InfoCardCellLabel">
            <text:p text:style-name="InfoLabelText">Date de paiement</text:p>
          </table:table-cell>
          <table:table-cell table:style-name="InfoCardCellValue">
            <text:p text:style-name="InfoValueText">[#if paiement.date_paiement??]${paiement.date_paiement}[/#if]</text:p>
          </table:table-cell>
        </table:table-row>
        <table:table-row>
          <table:table-cell table:style-name="InfoCardCellLabel">
            <text:p text:style-name="InfoLabelText">Référence</text:p>
          </table:table-cell>
          <table:table-cell table:style-name="InfoCardCellValue">
            <text:p text:style-name="InfoValueText">[#if paiement.reference_stripe??]${paiement.reference_stripe}[/#if]</text:p>
          </table:table-cell>
        </table:table-row>
      </table:table>
      <text:p text:style-name="Small">[#if intervention.notes??]</text:p>
      <text:p text:style-name="CalloutLabel">Notes</text:p>
      <text:p text:style-name="CalloutText">${intervention.notes}</text:p>
      <text:p text:style-name="Small">[/#if]</text:p>
      <text:p text:style-name="Small">[#if intervention.notes_technicien??]</text:p>
      <text:p text:style-name="CalloutLabel">Notes du technicien</text:p>
      <text:p text:style-name="CalloutText">${intervention.notes_technicien}</text:p>
      <text:p text:style-name="Small">[/#if]</text:p>
      <text:p text:style-name="Footnote">[#if nf.conditions_paiement??]${nf.conditions_paiement}[/#if]</text:p>
      <text:p text:style-name="Footnote">[#if nf??]${nf.legal_mention_1}[/#if]</text:p>
      <text:p text:style-name="Footnote">[#if nf.legal_mention_2??]${nf.legal_mention_2}[/#if]</text:p>
      <text:p text:style-name="Footnote">${entreprise.nom} — ${entreprise.adresse} — SIRET ${entreprise.siret}</text:p>
      <text:p text:style-name="Footnote">Document généré le ${system.date} — Réf. ${system.numero_auto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font-face-decls>
    <style:font-face style:name="Fraunces" svg:font-family="'Fraunces', 'Garamond', 'Georgia', serif"/>
    <style:font-face style:name="Inter" svg:font-family="'Inter', 'Helvetica Neue', 'Arial', sans-serif"/>
    <style:font-face style:name="DM Sans" svg:font-family="'DM Sans', 'Inter', 'Helvetica Neue', sans-serif"/>
    <style:font-face style:name="Space Grotesk" svg:font-family="'Space Grotesk', 'Inter', 'Helvetica Neue', 'Arial', sans-serif"/>
  </office:font-face-decls>
  <office:styles>
    <!-- Default paragraph style: clean sans-serif body -->
    <style:default-style style:family="paragraph">
      <style:paragraph-properties fo:line-height="140%" style:font-independent-line-spacing="false"/>
      <style:text-properties style:font-name="Inter" fo:font-size="10pt" fo:color="#211F1C"/>
    </style:default-style>
    <style:style style:name="Default" style:family="paragraph" style:class="text">
      <style:paragraph-properties fo:margin-top="0pt" fo:margin-bottom="0pt"/>
      <style:text-properties style:font-name="Inter" fo:font-size="10pt" fo:color="#211F1C"/>
    </style:style>
    <!-- ── Brand banner (Clenzy in cream) ── -->
    <style:style style:name="BrandBanner" style:family="paragraph">
      <style:paragraph-properties fo:text-align="start" fo:margin-bottom="2mm"/>
      <style:text-properties style:font-name="Fraunces" fo:font-size="28pt" fo:font-weight="bold" fo:color="#4A4138" fo:letter-spacing="-0.5pt"/>
    </style:style>
    <style:style style:name="BrandTagline" style:family="paragraph">
      <style:paragraph-properties fo:margin-top="0pt" fo:margin-bottom="8mm"/>
      <style:text-properties style:font-name="Inter" fo:font-size="7.5pt" fo:font-weight="bold" fo:color="#6E6256" fo:letter-spacing="2.5pt" style:text-transform="uppercase"/>
    </style:style>
    <!-- ── Document type label (top-right block) ── -->
    <style:style style:name="DocTypeEyebrow" style:family="paragraph">
      <style:paragraph-properties fo:text-align="end" fo:margin-bottom="1mm"/>
      <style:text-properties style:font-name="Inter" fo:font-size="8pt" fo:font-weight="bold" fo:color="#6E6256" fo:letter-spacing="2pt" style:text-transform="uppercase"/>
    </style:style>
    <style:style style:name="DocTypeTitle" style:family="paragraph">
      <style:paragraph-properties fo:text-align="end" fo:margin-bottom="2mm"/>
      <style:text-properties style:font-name="Fraunces" fo:font-size="22pt" fo:font-weight="bold" fo:color="#4A4138"/>
    </style:style>
    <style:style style:name="DocTypeMeta" style:family="paragraph">
      <style:paragraph-properties fo:text-align="end" fo:margin-bottom="1mm"/>
      <style:text-properties style:font-name="Inter" fo:font-size="9pt" fo:color="#6B645C"/>
    </style:style>
    <!-- ── Section title (gold underline) ── -->
    <style:style style:name="SectionTitle" style:family="paragraph">
      <style:paragraph-properties fo:margin-top="6mm" fo:margin-bottom="2mm" fo:padding-bottom="1.5mm" fo:border-bottom="0.5pt solid #8C7B6B"/>
      <style:text-properties style:font-name="Inter" fo:font-size="9pt" fo:font-weight="bold" fo:color="#4A4138" fo:letter-spacing="1.8pt" style:text-transform="uppercase"/>
    </style:style>
    <!-- ── Two-column party block ── -->
    <style:style style:name="PartyLabel" style:family="paragraph">
      <style:paragraph-properties fo:margin-bottom="1mm"/>
      <style:text-properties style:font-name="Inter" fo:font-size="7.5pt" fo:font-weight="bold" fo:color="#6E6256" fo:letter-spacing="1.5pt" style:text-transform="uppercase"/>
    </style:style>
    <style:style style:name="PartyName" style:family="paragraph">
      <style:paragraph-properties fo:margin-top="0pt" fo:margin-bottom="0.8mm"/>
      <style:text-properties style:font-name="Fraunces" fo:font-size="14pt" fo:font-weight="bold" fo:color="#4A4138"/>
    </style:style>
    <style:style style:name="PartyDetail" style:family="paragraph">
      <style:paragraph-properties fo:margin-top="0pt" fo:margin-bottom="0.3mm"/>
      <style:text-properties style:font-name="Inter" fo:font-size="9.5pt" fo:color="#211F1C"/>
    </style:style>
    <style:style style:name="PartyMuted" style:family="paragraph">
      <style:paragraph-properties fo:margin-top="0pt" fo:margin-bottom="0.3mm"/>
      <style:text-properties style:font-name="Inter" fo:font-size="9pt" fo:color="#6B645C"/>
    </style:style>
    <!-- ── Body paragraph ── -->
    <style:style style:name="Body" style:family="paragraph">
      <style:paragraph-properties fo:margin-top="2mm" fo:margin-bottom="2mm" fo:text-align="justify"/>
      <style:text-properties style:font-name="Inter" fo:font-size="10pt" fo:color="#211F1C"/>
    </style:style>
    <style:style style:name="BodyEmphasis" style:family="paragraph">
      <style:paragraph-properties fo:margin-top="2mm" fo:margin-bottom="2mm" fo:text-align="justify"/>
      <style:text-properties style:font-name="Inter" fo:font-size="10pt" fo:font-weight="bold" fo:color="#4A4138"/>
    </style:style>
    <style:style style:name="Footnote" style:family="paragraph">
      <style:paragraph-properties fo:margin-top="2mm" fo:margin-bottom="1mm"/>
      <style:text-properties style:font-name="Inter" fo:font-size="8.5pt" fo:color="#6B645C" fo:font-style="italic"/>
    </style:style>
    <!-- ── Table-related styles ── -->
    <style:style style:name="LineTable" style:family="table">
      <style:table-properties style:width="170mm" table:align="margins"/>
    </style:style>
    <style:style style:name="LineColDesc" style:family="table-column">
      <style:table-column-properties style:column-width="90mm"/>
    </style:style>
    <style:style style:name="LineColQty" style:family="table-column">
      <style:table-column-properties style:column-width="20mm"/>
    </style:style>
    <style:style style:name="LineColPrice" style:family="table-column">
      <style:table-column-properties style:column-width="30mm"/>
    </style:style>
    <style:style style:name="LineColTotal" style:family="table-column">
      <style:table-column-properties style:column-width="30mm"/>
    </style:style>
    <style:style style:name="TableHeaderCell" style:family="table-cell">
      <style:table-cell-properties fo:padding="1mm 3mm 2mm 3mm" fo:border-bottom="1.2pt solid #8C7B6B"/>
    </style:style>
    <style:style style:name="TableBodyCell" style:family="table-cell">
      <style:table-cell-properties fo:padding="3mm" fo:border-bottom="0.5pt solid #E7E0D4"/>
    </style:style>
    <style:style style:name="TableTotalCellLabel" style:family="table-cell">
      <style:table-cell-properties fo:background-color="#F1EBE2" fo:padding="3mm" fo:border-top="1pt solid #8C7B6B"/>
    </style:style>
    <style:style style:name="TableTotalCellValue" style:family="table-cell">
      <style:table-cell-properties fo:background-color="#F1EBE2" fo:padding="3mm" fo:border-top="1pt solid #8C7B6B"/>
    </style:style>
    <style:style style:name="TableHeaderText" style:family="paragraph">
      <style:paragraph-properties fo:text-align="start"/>
      <style:text-properties style:font-name="Inter" fo:font-size="8pt" fo:font-weight="bold" fo:color="#6E6256" fo:letter-spacing="1.2pt" style:text-transform="uppercase"/>
    </style:style>
    <style:style style:name="TableHeaderTextRight" style:family="paragraph">
      <style:paragraph-properties fo:text-align="end"/>
      <style:text-properties style:font-name="Inter" fo:font-size="8pt" fo:font-weight="bold" fo:color="#6E6256" fo:letter-spacing="1.2pt" style:text-transform="uppercase"/>
    </style:style>
    <style:style style:name="TableCellText" style:family="paragraph">
      <style:paragraph-properties/>
      <style:text-properties style:font-name="Inter" fo:font-size="9.5pt" fo:color="#211F1C"/>
    </style:style>
    <style:style style:name="TableCellTextRight" style:family="paragraph">
      <style:paragraph-properties fo:text-align="end"/>
      <style:text-properties style:font-name="Inter" fo:font-size="9.5pt" fo:color="#211F1C"/>
    </style:style>
    <style:style style:name="TotalLabelText" style:family="paragraph">
      <style:paragraph-properties fo:text-align="end"/>
      <style:text-properties style:font-name="Inter" fo:font-size="10pt" fo:font-weight="bold" fo:color="#4A4138" fo:letter-spacing="1pt" style:text-transform="uppercase"/>
    </style:style>
    <style:style style:name="TotalValueText" style:family="paragraph">
      <style:paragraph-properties fo:text-align="end"/>
      <style:text-properties style:font-name="Fraunces" fo:font-size="16pt" fo:font-weight="bold" fo:color="#4A4138"/>
    </style:style>
    <!-- ── Two-column container table for parties ── -->
    <style:style style:name="PartiesTable" style:family="table">
      <style:table-properties style:width="170mm" table:align="margins"/>
    </style:style>
    <style:style style:name="PartiesCol" style:family="table-column">
      <style:table-column-properties style:column-width="85mm"/>
    </style:style>
    <style:style style:name="PartiesCell" style:family="table-cell">
      <style:table-cell-properties fo:padding-right="6mm" fo:vertical-align="top"/>
    </style:style>
    <!-- ── Info card (key/value list inside a box) ── -->
    <style:style style:name="InfoCard" style:family="table">
      <style:table-properties style:width="170mm" table:align="margins"/>
    </style:style>
    <style:style style:name="InfoCardCellLabel" style:family="table-cell">
      <style:table-cell-properties fo:padding="2mm 3mm" fo:background-color="#F1EBE2" fo:border-bottom="0.5pt solid #E7E0D4"/>
    </style:style>
    <style:style style:name="InfoCardCellValue" style:family="table-cell">
      <style:table-cell-properties fo:padding="2mm 3mm" fo:background-color="#FFFFFF" fo:border-bottom="0.5pt solid #E7E0D4"/>
    </style:style>
    <style:style style:name="InfoLabelText" style:family="paragraph">
      <style:text-properties style:font-name="Inter" fo:font-size="8.5pt" fo:font-weight="bold" fo:color="#6B645C" fo:letter-spacing="0.8pt" style:text-transform="uppercase"/>
    </style:style>
    <style:style style:name="InfoValueText" style:family="paragraph">
      <style:text-properties style:font-name="Inter" fo:font-size="10pt" fo:color="#211F1C"/>
    </style:style>
    <!-- ── Signature block ── -->
    <style:style style:name="SignatureLabel" style:family="paragraph">
      <style:paragraph-properties fo:margin-top="20mm" fo:margin-bottom="1mm"/>
      <style:text-properties style:font-name="Inter" fo:font-size="8.5pt" fo:font-weight="bold" fo:color="#6B645C" fo:letter-spacing="1.2pt" style:text-transform="uppercase"/>
    </style:style>
    <style:style style:name="SignatureLine" style:family="paragraph">
      <style:paragraph-properties fo:padding-top="14mm" fo:border-top="0.5pt solid #211F1C"/>
      <style:text-properties style:font-name="Inter" fo:font-size="9pt" fo:font-style="italic" fo:color="#6B645C"/>
    </style:style>
    <!-- ── Footer text ── -->
    <style:style style:name="Footer" style:family="paragraph">
      <style:paragraph-properties fo:text-align="center" fo:margin-top="2mm"/>
      <style:text-properties style:font-name="Inter" fo:font-size="8pt" fo:color="#6B645C"/>
    </style:style>
    <!-- ── Inline text ── -->
    <style:style style:name="Strong" style:family="text">
      <style:text-properties fo:font-weight="bold" fo:color="#4A4138"/>
    </style:style>
    <style:style style:name="Italic" style:family="text">
      <style:text-properties fo:font-style="italic"/>
    </style:style>
    <style:style style:name="Gold" style:family="text">
      <style:text-properties fo:font-weight="bold" fo:color="#6E6256"/>
    </style:style>
    <!-- ── Image frame styles ── -->
    <style:style style:name="ImgInline" style:family="graphic">
      <style:graphic-properties style:wrap="none" style:vertical-pos="middle" style:vertical-rel="baseline" style:horizontal-pos="from-left" style:horizontal-rel="paragraph" draw:stroke="none" draw:fill="none"/>
    </style:style>
    <style:style style:name="LogoFrame" style:family="graphic">
      <style:graphic-properties style:wrap="none" style:vertical-pos="top" style:vertical-rel="paragraph" style:horizontal-pos="from-left" style:horizontal-rel="paragraph" draw:stroke="none" draw:fill="none"/>
    </style:style>
    <style:style style:name="StampFrame" style:family="graphic">
      <style:graphic-properties style:wrap="none" style:vertical-pos="top" style:vertical-rel="paragraph" style:horizontal-pos="right" style:horizontal-rel="paragraph" draw:stroke="none" draw:fill="none"/>
    </style:style>
    <style:style style:name="GoldRuleFrame" style:family="graphic">
      <style:graphic-properties style:wrap="none" style:vertical-pos="middle" style:vertical-rel="baseline" style:horizontal-pos="center" style:horizontal-rel="paragraph" draw:stroke="none" draw:fill="none"/>
    </style:style>
    <style:style style:name="SealFrame" style:family="graphic">
      <style:graphic-properties style:wrap="dynamic" style:run-through="background" style:vertical-pos="bottom" style:vertical-rel="paragraph" style:horizontal-pos="right" style:horizontal-rel="paragraph" draw:stroke="none" draw:fill="none"/>
    </style:style>
    <style:style style:name="LogoWrap" style:family="paragraph">
      <style:paragraph-properties fo:margin-bottom="2mm"/>
    </style:style>
    <style:style style:name="StampWrap" style:family="paragraph">
      <style:paragraph-properties fo:text-align="end" fo:margin-top="4mm" fo:margin-bottom="2mm"/>
    </style:style>
    <style:style style:name="GoldRuleWrap" style:family="paragraph">
      <style:paragraph-properties fo:text-align="center" fo:margin-top="3mm" fo:margin-bottom="3mm"/>
    </style:style>
    <style:style style:name="Wordmark" style:family="paragraph">
      <style:paragraph-properties fo:margin-bottom="2mm"/>
      <style:text-properties style:font-name="Space Grotesk" fo:font-size="27pt" fo:font-weight="bold" fo:color="#211F1C" fo:letter-spacing="-0.5pt"/>
    </style:style>
    <style:style style:name="WordmarkDot" style:family="text">
      <style:text-properties fo:color="#B0714F" fo:font-weight="bold"/>
    </style:style>
    <style:style style:name="FullCol" style:family="table-column">
      <style:table-column-properties style:column-width="170mm"/>
    </style:style>
    <style:style style:name="CalloutCell" style:family="table-cell">
      <style:table-cell-properties fo:background-color="#FFFFFF" fo:padding="3.5mm" fo:border-left="3pt solid #8C7B6B" fo:border-top="0.5pt solid #E7E0D4" fo:border-right="0.5pt solid #E7E0D4" fo:border-bottom="0.5pt solid #E7E0D4"/>
    </style:style>
    <style:style style:name="CalloutLabel" style:family="paragraph">
      <style:paragraph-properties fo:margin-bottom="1mm"/>
      <style:text-properties style:font-name="Inter" fo:font-size="7.5pt" fo:font-weight="bold" fo:color="#6E6256" fo:letter-spacing="1.2pt" style:text-transform="uppercase"/>
    </style:style>
    <style:style style:name="CalloutText" style:family="paragraph">
      <style:paragraph-properties fo:background-color="#FFFFFF" fo:border-left="3pt solid #8C7B6B" fo:border-top="0.5pt solid #E7E0D4" fo:border-right="0.5pt solid #E7E0D4" fo:border-bottom="0.5pt solid #E7E0D4" fo:padding="3.5mm" fo:margin-top="1mm"/>
      <style:text-properties style:font-name="Inter" fo:font-size="9.5pt" fo:color="#211F1C"/>
    </style:style>
    <style:style style:name="TotalOnDemand" style:family="paragraph">
      <style:paragraph-properties fo:text-align="end"/>
      <style:text-properties style:font-name="Inter" fo:font-size="11pt" fo:font-style="italic" fo:color="#6E6256"/>
    </style:style>
  </office:styles>
  <office:automatic-styles>
    <style:page-layout style:name="A4Layout">
      <style:page-layout-properties fo:page-width="210mm" fo:page-height="297mm" fo:margin-top="18mm" fo:margin-bottom="18mm" fo:margin-left="20mm" fo:margin-right="20mm" style:print-orientation="portrait" fo:background-color="#FAF9F6"/>
      <style:header-style/>
      <style:footer-style>
        <style:header-footer-properties fo:min-height="10mm" fo:margin-top="4mm"/>
      </style:footer-style>
    </style:page-layout>
  </office:automatic-styles>
  <office:master-styles>
    <style:master-page style:name="Standard" style:page-layout-name="A4Layout">
      <style:footer>
        <text:p text:style-name="Footer">${entreprise.nom} · ${entreprise.adresse} · SIRET ${entreprise.siret} · ${entreprise.email} · ${entreprise.telephone}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Clenzy Template Generator</meta:generator>
    <dc:title>Devis Clenzy</dc:title>
    <dc:creator>Clenzy</dc:creator>
    <meta:initial-creator>Clenzy</meta:initial-creator>
    <meta:creation-date>2026-05-17T19:58:18</meta:creation-date>
  </office:meta>
</office:document-meta>
</file>